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60000006461C73B10.png" manifest:media-type="image/png"/>
  <manifest:file-entry manifest:full-path="Pictures/10000001000002DC000000113921DBE4.png" manifest:media-type="image/png"/>
  <manifest:file-entry manifest:full-path="Pictures/1000000100000269000000A1A3BE2997.png" manifest:media-type="image/png"/>
  <manifest:file-entry manifest:full-path="Pictures/10000001000003A70000002B6362D97B.png" manifest:media-type="image/png"/>
  <manifest:file-entry manifest:full-path="Pictures/10000001000001E90000006DB2F1A9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fo:font-weight="bold" officeooo:rsid="00100d44" officeooo:paragraph-rsid="00100d44"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00d44" officeooo:paragraph-rsid="00100d44"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8pt" style:text-underline-style="none" fo:font-weight="bold" officeooo:rsid="00100d44" officeooo:paragraph-rsid="00100d44"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4pt" style:text-underline-style="none" fo:font-weight="normal" officeooo:rsid="00100d44" officeooo:paragraph-rsid="00100d44"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21705" officeooo:paragraph-rsid="00121705" style:font-size-asian="15pt" style:font-weight-asian="normal" style:font-size-complex="15pt" style:font-weight-complex="normal"/>
    </style:style>
    <style:style style:name="P6" style:family="paragraph" style:parent-style-name="Text_20_body">
      <style:paragraph-properties fo:text-align="start" style:justify-single-word="false"/>
      <style:text-properties fo:font-size="14pt" style:text-underline-style="none" fo:font-weight="normal" officeooo:rsid="00100d44" officeooo:paragraph-rsid="00100d44" style:font-size-asian="12.25pt" style:font-weight-asian="normal" style:font-size-complex="14pt" style:font-weight-complex="normal"/>
    </style:style>
    <style:style style:name="P7" style:family="paragraph" style:parent-style-name="Text_20_body" style:list-style-name="L1">
      <style:text-properties fo:font-size="14pt" officeooo:rsid="00100d44" style:font-size-asian="12.25pt" style:font-size-complex="14pt"/>
    </style:style>
    <style:style style:name="P8" style:family="paragraph" style:parent-style-name="Text_20_body" style:list-style-name="L1">
      <style:text-properties fo:font-size="11pt" officeooo:rsid="00100d44" style:font-size-asian="11pt" style:font-size-complex="11pt"/>
    </style:style>
    <style:style style:name="P9" style:family="paragraph" style:parent-style-name="Standard">
      <style:paragraph-properties fo:text-align="start" style:justify-single-word="false"/>
      <style:text-properties fo:font-size="11pt" style:text-underline-style="none" fo:font-weight="normal" officeooo:rsid="00121705" officeooo:paragraph-rsid="00121705"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121705" officeooo:paragraph-rsid="00121705"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5pt" style:text-underline-style="none" fo:font-weight="normal" officeooo:rsid="00121705" officeooo:paragraph-rsid="00121705"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21705" officeooo:paragraph-rsid="00121705"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officeooo:paragraph-rsid="0012d6eb"/>
    </style:style>
    <style:style style:name="P14" style:family="paragraph" style:parent-style-name="Standard">
      <style:paragraph-properties fo:text-align="start" style:justify-single-word="false"/>
      <style:text-properties fo:font-size="14pt" style:text-underline-style="none" fo:font-weight="normal" officeooo:rsid="00121705" officeooo:paragraph-rsid="0012d6eb"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45f8c" officeooo:paragraph-rsid="00145f8c"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145f8c" officeooo:paragraph-rsid="00145f8c" style:font-size-asian="14pt" style:font-weight-asian="normal" style:font-size-complex="14pt" style:font-weight-complex="normal"/>
    </style:style>
    <style:style style:name="P17" style:family="paragraph" style:parent-style-name="Text_20_body">
      <style:paragraph-properties fo:text-align="start" style:justify-single-word="false"/>
      <style:text-properties fo:font-size="11pt" style:text-underline-style="none" fo:font-weight="normal" officeooo:rsid="00121705" officeooo:paragraph-rsid="0012d6eb" style:font-size-asian="11pt" style:font-weight-asian="normal" style:font-size-complex="11pt" style:font-weight-complex="normal"/>
    </style:style>
    <style:style style:name="P18" style:family="paragraph" style:parent-style-name="Text_20_body" style:list-style-name="L2">
      <style:text-properties fo:font-size="14pt" officeooo:rsid="00121705" style:font-size-asian="14pt" style:font-size-complex="14pt"/>
    </style:style>
    <style:style style:name="P19" style:family="paragraph" style:parent-style-name="Standard">
      <style:paragraph-properties fo:text-align="start" style:justify-single-word="false"/>
      <style:text-properties fo:font-size="14pt" style:text-underline-style="none" fo:font-weight="normal" officeooo:rsid="00145f8c" officeooo:paragraph-rsid="0012d6eb" style:font-size-asian="14pt" style:font-weight-asian="normal" style:font-size-complex="14pt" style:font-weight-complex="normal"/>
    </style:style>
    <style:style style:name="P20" style:family="paragraph" style:parent-style-name="Text_20_body">
      <style:paragraph-properties fo:text-align="start" style:justify-single-word="false"/>
      <style:text-properties fo:font-size="11pt" style:text-underline-style="none" fo:font-weight="normal" officeooo:rsid="00145f8c" officeooo:paragraph-rsid="0012d6eb" style:font-size-asian="11pt" style:font-weight-asian="normal" style:font-size-complex="11pt" style:font-weight-complex="normal"/>
    </style:style>
    <style:style style:name="P21" style:family="paragraph" style:parent-style-name="Text_20_body" style:list-style-name="L3">
      <style:text-properties fo:font-size="14pt" officeooo:rsid="00145f8c" style:font-size-asian="14pt" style:font-size-complex="14pt"/>
    </style:style>
    <style:style style:name="P22" style:family="paragraph" style:parent-style-name="Text_20_body">
      <style:text-properties fo:font-size="15pt" style:text-underline-style="solid" style:text-underline-width="auto" style:text-underline-color="font-color" style:font-size-asian="15pt" style:font-size-complex="15pt"/>
    </style:style>
    <style:style style:name="P23" style:family="paragraph" style:parent-style-name="Standard">
      <loext:graphic-properties draw:fill="solid" draw:fill-color="#191a1c"/>
      <style:paragraph-properties fo:background-color="#191a1c" fo:padding="0cm" fo:border="none" style:shadow="none"/>
    </style:style>
    <style:style style:name="P24" style:family="paragraph" style:parent-style-name="Text_20_body">
      <style:paragraph-properties fo:text-align="start" style:justify-single-word="false"/>
      <style:text-properties fo:font-size="14pt" officeooo:rsid="00145f8c" officeooo:paragraph-rsid="0019233f" style:font-size-asian="14pt" style:font-size-complex="14pt"/>
    </style:style>
    <style:style style:name="P25" style:family="paragraph" style:parent-style-name="Text_20_body">
      <style:text-properties fo:font-size="15pt" style:text-underline-style="solid" style:text-underline-width="auto" style:text-underline-color="font-color" officeooo:paragraph-rsid="0019233f" style:font-size-asian="15pt" style:font-size-complex="15pt"/>
    </style:style>
    <style:style style:name="P26" style:family="paragraph" style:parent-style-name="Text_20_body">
      <style:text-properties fo:font-size="15pt" officeooo:paragraph-rsid="0019233f" style:font-size-asian="15pt"/>
    </style:style>
    <style:style style:name="P27" style:family="paragraph" style:parent-style-name="Standard">
      <loext:graphic-properties draw:fill="solid" draw:fill-color="#191a1c"/>
      <style:paragraph-properties fo:background-color="#191a1c" fo:padding="0cm" fo:border="none" style:shadow="none"/>
      <style:text-properties officeooo:paragraph-rsid="0019233f"/>
    </style:style>
    <style:style style:name="P28" style:family="paragraph" style:parent-style-name="Standard">
      <style:text-properties fo:font-size="15pt" style:text-underline-style="solid" style:text-underline-width="auto" style:text-underline-color="font-color" officeooo:rsid="0019233f" officeooo:paragraph-rsid="0019233f" style:font-size-asian="15pt" style:font-size-complex="15pt"/>
    </style:style>
    <style:style style:name="P29" style:family="paragraph" style:parent-style-name="Text_20_body">
      <style:text-properties fo:color="#000000" loext:opacity="100%" style:font-name="JetBrains Mono" fo:font-size="11pt" fo:font-style="normal" style:text-underline-style="none" fo:font-weight="normal" officeooo:rsid="001a1a59" officeooo:paragraph-rsid="001a1a59" fo:background-color="#ffff00" style:font-size-asian="11pt" style:font-style-asian="normal" style:font-weight-asian="normal" style:font-size-complex="11pt"/>
    </style:style>
    <style:style style:name="P30" style:family="paragraph" style:parent-style-name="Text_20_body" style:list-style-name="L4">
      <style:text-properties fo:color="#000000" loext:opacity="100%" style:font-name="JetBrains Mono" fo:font-size="11pt" officeooo:rsid="001a1a59" fo:background-color="#ffff00" style:font-size-asian="11pt" style:font-size-complex="11pt"/>
    </style:style>
    <style:style style:name="P31" style:family="paragraph" style:parent-style-name="Text_20_body" style:list-style-name="L5">
      <style:text-properties fo:color="#000000" loext:opacity="100%" style:font-name="JetBrains Mono" fo:font-size="11pt" officeooo:rsid="001a1a59" fo:background-color="#ffff00" style:font-size-asian="11pt" style:font-size-complex="11pt"/>
    </style:style>
    <style:style style:name="P32" style:family="paragraph" style:parent-style-name="Text_20_body">
      <style:text-properties fo:font-size="15pt" officeooo:paragraph-rsid="001a1a59" style:font-size-asian="15pt"/>
    </style:style>
    <style:style style:name="P33" style:family="paragraph" style:parent-style-name="Text_20_body">
      <style:text-properties fo:font-size="15pt" style:text-underline-style="solid" style:text-underline-width="auto" style:text-underline-color="font-color" officeooo:paragraph-rsid="001a1a59" style:font-size-asian="15pt" style:font-size-complex="15pt"/>
    </style:style>
    <style:style style:name="P34" style:family="paragraph" style:parent-style-name="Text_20_body" style:list-style-name="L6">
      <style:text-properties fo:font-size="15pt" style:text-underline-style="solid" style:text-underline-width="auto" style:text-underline-color="font-color" style:font-size-asian="15pt" style:font-size-complex="15pt"/>
    </style:style>
    <style:style style:name="P35" style:family="paragraph" style:parent-style-name="Text_20_body">
      <style:text-properties fo:font-size="11pt" style:text-underline-style="none" officeooo:paragraph-rsid="001b2224" style:font-size-asian="11pt" style:font-size-complex="11pt"/>
    </style:style>
    <style:style style:name="P36" style:family="paragraph" style:parent-style-name="Text_20_body">
      <style:text-properties officeooo:paragraph-rsid="001b2224"/>
    </style:style>
    <style:style style:name="P37" style:family="paragraph" style:parent-style-name="Text_20_body" style:list-style-name="L7">
      <style:text-properties fo:font-size="11pt" style:font-size-asian="11pt" style:font-size-complex="11pt"/>
    </style:style>
    <style:style style:name="P38" style:family="paragraph" style:parent-style-name="Text_20_body">
      <style:text-properties fo:font-size="15pt" officeooo:paragraph-rsid="001b2224" style:font-size-asian="15pt"/>
    </style:style>
    <style:style style:name="P39" style:family="paragraph" style:parent-style-name="Text_20_body">
      <style:text-properties fo:font-size="11pt" style:text-underline-style="none" fo:font-weight="bold" officeooo:paragraph-rsid="001a1a59" style:font-size-asian="11pt" style:font-size-complex="11pt"/>
    </style:style>
    <style:style style:name="P40" style:family="paragraph" style:parent-style-name="Text_20_body">
      <style:text-properties fo:font-size="11pt" style:text-underline-style="none" officeooo:paragraph-rsid="001a1a59" style:font-size-asian="11pt" style:font-size-complex="11pt"/>
    </style:style>
    <style:style style:name="P41" style:family="paragraph" style:parent-style-name="Text_20_body" style:list-style-name="L8">
      <style:text-properties fo:font-size="11pt" style:font-size-asian="11pt" style:font-size-complex="11pt"/>
    </style:style>
    <style:style style:name="P42" style:family="paragraph" style:parent-style-name="Standard">
      <style:text-properties fo:font-size="11pt" style:text-underline-style="none" officeooo:paragraph-rsid="001a1a59" style:font-size-asian="11pt" style:font-size-complex="11pt"/>
    </style:style>
    <style:style style:name="P43" style:family="paragraph" style:parent-style-name="Text_20_body" style:list-style-name="L9">
      <style:text-properties fo:font-size="11pt" style:font-size-asian="11pt" style:font-size-complex="11pt"/>
    </style:style>
    <style:style style:name="P44" style:family="paragraph" style:parent-style-name="Text_20_body">
      <style:text-properties fo:font-size="16pt" fo:font-weight="bold" officeooo:paragraph-rsid="001d2193" style:font-size-asian="16pt" style:font-weight-asian="bold" style:font-size-complex="16pt" style:font-weight-complex="bold"/>
    </style:style>
    <style:style style:name="P45" style:family="paragraph" style:parent-style-name="Standard">
      <style:text-properties fo:font-size="15pt" style:text-underline-style="solid" style:text-underline-width="auto" style:text-underline-color="font-color" officeooo:paragraph-rsid="001d2193" style:font-size-asian="15pt" style:font-size-complex="15pt"/>
    </style:style>
    <style:style style:name="P46" style:family="paragraph" style:parent-style-name="Text_20_body">
      <style:text-properties fo:font-size="15pt" style:text-underline-style="solid" style:text-underline-width="auto" style:text-underline-color="font-color" officeooo:paragraph-rsid="001d2193" style:font-size-asian="15pt" style:font-size-complex="15pt"/>
    </style:style>
    <style:style style:name="P47" style:family="paragraph" style:parent-style-name="Text_20_body">
      <style:text-properties fo:font-size="11pt" style:text-underline-style="solid" style:text-underline-width="auto" style:text-underline-color="font-color" officeooo:paragraph-rsid="001d2193" style:font-size-asian="11pt" style:font-size-complex="11pt"/>
    </style:style>
    <style:style style:name="P48" style:family="paragraph" style:parent-style-name="Standard">
      <style:text-properties fo:font-size="11pt" style:text-underline-style="solid" style:text-underline-width="auto" style:text-underline-color="font-color" officeooo:paragraph-rsid="001d2193" style:font-size-asian="11pt" style:font-size-complex="11pt"/>
    </style:style>
    <style:style style:name="P49" style:family="paragraph" style:parent-style-name="Text_20_body">
      <style:text-properties fo:font-size="11pt" style:text-underline-style="solid" style:text-underline-width="auto" style:text-underline-color="font-color" officeooo:paragraph-rsid="001e09c7" style:font-size-asian="11pt" style:font-size-complex="11pt"/>
    </style:style>
    <style:style style:name="P50" style:family="paragraph" style:parent-style-name="Text_20_body">
      <style:text-properties fo:font-size="11pt" style:text-underline-style="solid" style:text-underline-width="auto" style:text-underline-color="font-color" officeooo:rsid="001e09c7" officeooo:paragraph-rsid="001e09c7" style:font-size-asian="11pt" style:font-size-complex="11pt"/>
    </style:style>
    <style:style style:name="P51" style:family="paragraph" style:parent-style-name="Standard">
      <loext:graphic-properties draw:fill="solid" draw:fill-color="#191a1c"/>
      <style:paragraph-properties fo:background-color="#191a1c" fo:padding="0cm" fo:border="none" style:shadow="none"/>
      <style:text-properties officeooo:paragraph-rsid="001e09c7"/>
    </style:style>
    <style:style style:name="T1" style:family="text">
      <style:text-properties fo:font-size="11pt" style:font-size-asian="11pt" style:font-size-complex="11pt"/>
    </style:style>
    <style:style style:name="T2" style:family="text">
      <style:text-properties fo:font-size="11pt" officeooo:rsid="00110b9d" style:font-size-asian="11pt" style:font-size-complex="11pt"/>
    </style:style>
    <style:style style:name="T3" style:family="text">
      <style:text-properties fo:font-size="11pt" fo:font-weight="bold" style:font-size-asian="11pt" style:font-size-complex="11pt"/>
    </style:style>
    <style:style style:name="T4" style:family="text">
      <style:text-properties fo:font-size="11pt" officeooo:rsid="00110b9d" fo:background-color="#ffff00" loext:char-shading-value="0" style:font-size-asian="11pt" style:font-size-complex="11pt"/>
    </style:style>
    <style:style style:name="T5" style:family="text">
      <style:text-properties fo:font-size="11pt" officeooo:rsid="00121705" style:font-size-asian="11pt" style:font-size-complex="11pt"/>
    </style:style>
    <style:style style:name="T6" style:family="text">
      <style:text-properties fo:font-size="11pt" fo:font-style="italic" style:font-size-asian="11pt" style:font-size-complex="11pt"/>
    </style:style>
    <style:style style:name="T7" style:family="text">
      <style:text-properties fo:font-size="11pt" style:text-underline-style="none" fo:font-weight="normal" officeooo:rsid="00121705" style:font-size-asian="11pt" style:font-weight-asian="normal" style:font-size-complex="11pt" style:font-weight-complex="normal"/>
    </style:style>
    <style:style style:name="T8" style:family="text">
      <style:text-properties fo:font-size="11pt" style:text-underline-style="none" fo:font-weight="normal" officeooo:rsid="0012d6eb" style:font-size-asian="11pt" style:font-weight-asian="normal" style:font-size-complex="11pt" style:font-weight-complex="normal"/>
    </style:style>
    <style:style style:name="T9" style:family="text">
      <style:text-properties fo:font-weight="bold"/>
    </style:style>
    <style:style style:name="T10" style:family="text">
      <style:text-properties officeooo:rsid="00145f8c"/>
    </style:style>
    <style:style style:name="T11" style:family="text">
      <style:text-properties officeooo:rsid="0019233f"/>
    </style:style>
    <style:style style:name="T12" style:family="text">
      <style:text-properties fo:color="#bcbec4" loext:opacity="100%" style:font-name="JetBrains Mono" fo:font-size="10pt" fo:font-style="normal" fo:font-weight="normal" style:font-size-asian="10pt" style:font-style-asian="normal" style:font-weight-asian="normal"/>
    </style:style>
    <style:style style:name="T13" style:family="text">
      <style:text-properties fo:color="#56a8f5" loext:opacity="100%" style:font-name="JetBrains Mono" fo:font-size="10pt" fo:font-style="normal" fo:font-weight="normal" style:font-size-asian="10pt" style:font-style-asian="normal" style:font-weight-asian="normal"/>
    </style:style>
    <style:style style:name="T14" style:family="text">
      <style:text-properties fo:color="#c77dba" loext:opacity="100%" style:font-name="JetBrains Mono" fo:font-size="10pt" fo:font-style="italic" fo:font-weight="normal" style:font-size-asian="10pt" style:font-style-asian="italic" style:font-weight-asian="normal"/>
    </style:style>
    <style:style style:name="T15" style:family="text">
      <style:text-properties fo:color="#c77dbb" loext:opacity="100%" style:font-name="JetBrains Mono" fo:font-size="10pt" fo:font-style="normal" fo:font-weight="normal" style:font-size-asian="10pt" style:font-style-asian="normal" style:font-weight-asian="normal"/>
    </style:style>
    <style:style style:name="T16" style:family="text">
      <style:text-properties fo:color="#2aacb8" loext:opacity="100%" style:font-name="JetBrains Mono" fo:font-size="10pt" fo:font-style="normal" fo:font-weight="normal" style:font-size-asian="10pt" style:font-style-asian="normal" style:font-weight-asian="normal"/>
    </style:style>
    <style:style style:name="T17" style:family="text">
      <style:text-properties fo:font-size="11pt" style:text-underline-style="none" fo:font-weight="bold" style:font-size-asian="11pt" style:font-weight-asian="normal" style:font-size-complex="11pt" style:font-weight-complex="normal"/>
    </style:style>
    <style:style style:name="T18" style:family="text">
      <style:text-properties fo:font-size="11pt" style:text-underline-style="none" fo:font-weight="normal" style:font-size-asian="11pt" style:font-weight-asian="normal" style:font-size-complex="11pt" style:font-weight-complex="normal"/>
    </style:style>
    <style:style style:name="T19" style:family="text">
      <style:text-properties style:text-underline-style="solid" style:text-underline-width="auto" style:text-underline-color="font-color" style:font-size-complex="15pt"/>
    </style:style>
    <style:style style:name="T20" style:family="text">
      <style:text-properties style:text-underline-style="solid" style:text-underline-width="auto" style:text-underline-color="font-color" officeooo:rsid="0019233f" style:font-size-complex="15pt"/>
    </style:style>
    <style:style style:name="T21" style:family="text">
      <style:text-properties fo:color="#cf8e6d" loext:opacity="100%" style:font-name="JetBrains Mono" fo:font-size="10pt" fo:font-style="normal" fo:font-weight="normal" style:font-size-asian="10pt" style:font-style-asian="normal" style:font-weight-asian="normal"/>
    </style:style>
    <style:style style:name="T22" style:family="text">
      <style:text-properties fo:color="#aa4926" loext:opacity="100%" style:font-name="JetBrains Mono" fo:font-size="10pt" fo:font-style="normal" fo:font-weight="normal" style:font-size-asian="10pt" style:font-style-asian="normal" style:font-weight-asian="normal"/>
    </style:style>
    <style:style style:name="T23" style:family="text">
      <style:text-properties fo:color="#6aab73" loext:opacity="100%" style:font-name="JetBrains Mono" fo:font-size="10pt" fo:font-style="normal" fo:font-weight="normal" style:font-size-asian="10pt" style:font-style-asian="normal" style:font-weight-asian="normal"/>
    </style:style>
    <style:style style:name="T24" style:family="text">
      <style:text-properties fo:font-weight="bold" fo:background-color="transparent" loext:char-shading-value="0"/>
    </style:style>
    <style:style style:name="T25" style:family="text">
      <style:text-properties fo:background-color="transparent" loext:char-shading-value="0"/>
    </style:style>
    <style:style style:name="T26" style:family="text">
      <style:text-properties fo:font-weight="bold" fo:background-color="transparent" loext:char-shading-value="0"/>
    </style:style>
    <style:style style:name="T27" style:family="text">
      <style:text-properties fo:background-color="transparent" loext:char-shading-value="0"/>
    </style:style>
    <style:style style:name="T28" style:family="text">
      <style:text-properties style:text-underline-style="solid" style:text-underline-width="auto" style:text-underline-color="font-color" officeooo:rsid="001a1a59" style:font-size-complex="15pt"/>
    </style:style>
    <style:style style:name="T29" style:family="text">
      <style:text-properties style:text-underline-style="solid" style:text-underline-width="auto" style:text-underline-color="font-color" officeooo:rsid="001b2224" style:font-size-complex="15pt"/>
    </style:style>
    <style:style style:name="T30" style:family="text">
      <style:text-properties fo:font-size="11pt" style:text-underline-style="none" fo:font-weight="bold" style:font-size-asian="11pt" style:font-size-complex="11pt"/>
    </style:style>
    <style:style style:name="T31" style:family="text">
      <style:text-properties fo:font-size="11pt" style:text-underline-style="none" style:font-size-asian="11pt" style:font-size-complex="11pt"/>
    </style:style>
    <style:style style:name="T32" style:family="text">
      <style:text-properties fo:color="#7a7e85" loext:opacity="100%" style:font-name="JetBrains Mono" fo:font-size="10pt" fo:font-style="normal" fo:font-weight="normal" style:font-size-asian="10pt" style:font-style-asian="normal" style:font-weight-asian="normal"/>
    </style:style>
    <style:style style:name="T33" style:family="text">
      <style:text-properties fo:color="#6f737a" loext:opacity="100%" style:font-name="JetBrains Mono" fo:font-size="10pt" fo:font-style="normal" fo:font-weight="normal" style:font-size-asian="10pt" style:font-style-asian="normal" style:font-weight-asian="normal"/>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1d2193"/>
    </style:style>
    <style:style style:name="T36" style:family="text">
      <style:text-properties fo:color="#bcbec4" loext:opacity="100%" style:font-name="JetBrains Mono" fo:font-size="10pt" fo:font-style="normal" fo:font-weight="normal" fo:background-color="#ffff00" loext:char-shading-value="0" style:font-size-asian="10pt" style:font-style-asian="normal" style:font-weight-asian="normal"/>
    </style:style>
    <style:style style:name="T37" style:family="text">
      <style:text-properties style:text-underline-style="none"/>
    </style:style>
    <style:style style:name="T38" style:family="text">
      <style:text-properties style:text-underline-style="none" officeooo:rsid="001e09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E Intégrative</text:p>
      <text:p text:style-name="P2"/>
      <text:p text:style-name="P2"/>
      <text:p text:style-name="P3">VIEWS.PY :</text:p>
      <text:p text:style-name="P4"/>
      <text:p text:style-name="P5">- Calcule des moyennes :</text:p>
      <text:p text:style-name="P4"/>
      <text:p text:style-name="P4"><draw:frame draw:style-name="fr1" draw:name="Image1" text:anchor-type="char" svg:x="1.789cm" svg:y="0.159cm" svg:width="13.423cm" svg:height="2.027cm" draw:z-index="0"><draw:image xlink:href="Pictures/10000001000002960000006461C73B10.png" xlink:type="simple" xlink:show="embed" xlink:actuate="onLoad" draw:mime-type="image/png"/></draw:frame><text:span text:style-name="T1">En Django, mettre </text:span><text:span text:style-name="Source_20_Text"><text:span text:style-name="T1">.values()</text:span></text:span><text:span text:style-name="T1"> juste après un </text:span><text:span text:style-name="Source_20_Text"><text:span text:style-name="T1">.objects</text:span></text:span><text:span text:style-name="T1"> change le comportement de la requête. Au lieu de récupérer des objets complets, </text:span><text:span text:style-name="T2">on</text:span><text:span text:style-name="T1"> demandes à Django de </text:span><text:span text:style-name="T3">regrouper</text:span><text:span text:style-name="T1"> les lignes qui ont exactement la même valeur dans le champ spécifié </text:span><text:span text:style-name="T2">( en l’occurrence </text:span><text:span text:style-name="T4">« id_capteur__emplacement »</text:span><text:span text:style-name="T2"> </text:span><text:span text:style-name="T1">. </text:span><text:span text:style-name="T2">Cela permet d’optimiser notre application pour éviter des gros calcules qui fera ralentir </text:span><text:span text:style-name="T5">( moins d’utilisation de RAM)</text:span><text:span text:style-name="T2"> notre applications a partir d’un certain nombres de valeurs.</text:span></text:p>
      <text:p text:style-name="P6"><text:span text:style-name="T1">Une fois les groupes formés par pièce, </text:span><text:span text:style-name="Source_20_Text"><text:span text:style-name="T1">.annotate()</text:span></text:span><text:span text:style-name="T1"> (qui signifie "ajouter une note" ou "calculer une colonne supplémentaire") va appliquer une fonction mathématique sur </text:span><text:span text:style-name="T3">chaque groupe</text:span><text:span text:style-name="T1">.</text:span></text:p>
      <text:list text:style-name="L1">
        <text:list-item>
          <text:p text:style-name="P7"><text:span text:style-name="T1">Ici, on utilise </text:span><text:span text:style-name="Source_20_Text"><text:span text:style-name="T1">Avg('temperature')</text:span></text:span><text:span text:style-name="T1"> (</text:span><text:span text:style-name="Source_20_Text"><text:span text:style-name="T1">Avg</text:span></text:span><text:span text:style-name="T1"> pour </text:span><text:span text:style-name="T6">Average</text:span><text:span text:style-name="T1"> / Moyenne).</text:span></text:p>
        </text:list-item>
        <text:list-item>
          <text:p text:style-name="P8">MySQL va prendre toutes les températures de la 'chambre1', calculer leur moyenne, et associer ce résultat unique au groupe 'chambre1'. Il fait de même pour le 'sejour'.</text:p>
        </text:list-item>
      </text:list>
      <text:p text:style-name="P9">Voici a quoi ressemble la requête côté SQL : </text:p>
      <text:p text:style-name="P10"/>
      <text:p text:style-name="P11"><draw:frame draw:style-name="fr2" draw:name="Image2" text:anchor-type="char" svg:width="13.76cm" svg:height="3.59cm" draw:z-index="1"><draw:image xlink:href="Pictures/1000000100000269000000A1A3BE2997.png" xlink:type="simple" xlink:show="embed" xlink:actuate="onLoad" draw:mime-type="image/png"/></draw:frame></text:p>
      <text:p text:style-name="P11"/>
      <text:p text:style-name="P12">- Affichage des 5 dernières données sur me dashboard :</text:p>
      <text:p text:style-name="P12"/>
      <text:p text:style-name="P13"><draw:frame draw:style-name="fr3" draw:name="Image3" text:anchor-type="char" svg:width="17cm" svg:height="0.702cm" draw:z-index="2"><draw:image xlink:href="Pictures/10000001000002DC000000113921DBE4.png" xlink:type="simple" xlink:show="embed" xlink:actuate="onLoad" draw:mime-type="image/png"/></draw:frame><text:span text:style-name="T7">Par défaut, l'accès à des clés étrangères dans une boucle génère le problème de performance dit des 'requêtes en N+1', où le serveur sature la base de données d'allers-retours. Pour optimiser l'application, j'ai utilisé la méthode </text:span><text:span text:style-name="Source_20_Text"><text:span text:style-name="T7">select_related</text:span></text:span><text:span text:style-name="T7"> de Django. Cela force à réaliser une </text:span><text:span text:style-name="T8">requêtes </text:span><text:span text:style-name="T7">SQL (JOIN) côté base de données. On passe ainsi de 6 requêtes SQL à une seule requête unique pour afficher le tableau des derniers relevés, ce qui garantit la </text:span><text:span text:style-name="T8">fiabilité</text:span><text:span text:style-name="T7"> de l'application si le volume de données augmente</text:span><text:span text:style-name="T8"> (</text:span><text:span text:style-name="T1">Django charge tout ça en mémoire en </text:span><text:span text:style-name="T3">une seule et unique requête SQL</text:span><text:span text:style-name="T1">. Peu importe si tu affiches 5, 100 ou 1000 lignes, le nombre de requêtes restera égal à </text:span><text:span text:style-name="T3">1</text:span><text:span text:style-name="T8">)</text:span><text:span text:style-name="T7">. <text:s text:c="4"/></text:span></text:p>
      <text:p text:style-name="P14"/>
      <text:p text:style-name="P15">- Filtrage :</text:p>
      <text:p text:style-name="P15"><text:soft-page-break/></text:p>
      <text:p text:style-name="P15"/>
      <text:p text:style-name="P16"><draw:frame draw:style-name="fr2" draw:name="Image4" text:anchor-type="char" svg:width="19.001cm" svg:height="1.041cm" draw:z-index="3"><draw:image xlink:href="Pictures/10000001000003A70000002B6362D97B.png" xlink:type="simple" xlink:show="embed" xlink:actuate="onLoad" draw:mime-type="image/png"/></draw:frame></text:p>
      <text:p text:style-name="P17">Django effectue trois actions en une seule ligne :</text:p>
      <text:list text:style-name="L2">
        <text:list-item>
          <text:p text:style-name="P18"><text:span text:style-name="Source_20_Text"><text:span text:style-name="T3">filter(id_capteur__emplacement=salle_nom)</text:span></text:span><text:span text:style-name="T1"> : Remarque la </text:span><text:span text:style-name="T3">double liasse de soulignement (</text:span><text:span text:style-name="Source_20_Text"><text:span text:style-name="T3">__</text:span></text:span><text:span text:style-name="T3">)</text:span><text:span text:style-name="T1">. C'est la syntaxe de Django pour traverser les tables. Tu pars de la table </text:span><text:span text:style-name="Source_20_Text"><text:span text:style-name="T1">Donnees</text:span></text:span><text:span text:style-name="T1">, tu suis la clé étrangère </text:span><text:span text:style-name="Source_20_Text"><text:span text:style-name="T1">id_capteur</text:span></text:span><text:span text:style-name="T1"> pour sauter dans la table </text:span><text:span text:style-name="Source_20_Text"><text:span text:style-name="T1">Capteurs</text:span></text:span><text:span text:style-name="T1">, et tu filtres sur la colonne </text:span><text:span text:style-name="Source_20_Text"><text:span text:style-name="T1">emplacement</text:span></text:span><text:span text:style-name="T1">.</text:span></text:p>
        </text:list-item>
        <text:list-item>
          <text:p text:style-name="P18"><text:span text:style-name="Source_20_Text"><text:span text:style-name="T3">.select_related('id_capteur')</text:span></text:span><text:span text:style-name="T1"> : C'est l'optimisation (Jointure SQL) qu'on a vue juste avant. On embarque tout de suite les infos du capteur pour s'éviter le piège du N+1 requêtes lors de l'affichage dans le tableau HTML.</text:span></text:p>
        </text:list-item>
        <text:list-item>
          <text:p text:style-name="P18"><text:span text:style-name="Source_20_Text"><text:span text:style-name="T3">.order_by('-timestamp')</text:span></text:span><text:span text:style-name="T1"> : Le signe </text:span><text:span text:style-name="T3">moins (</text:span><text:span text:style-name="Source_20_Text"><text:span text:style-name="T3">-</text:span></text:span><text:span text:style-name="T3">)</text:span><text:span text:style-name="T1"> indique un tri </text:span><text:span text:style-name="T3">décroissant</text:span><text:span text:style-name="T1">. Les mesures les plus récentes apparaîtront en premier dans ton tableau HTML.</text:span></text:p>
        </text:list-item>
      </text:list>
      <text:p text:style-name="P14"><draw:frame draw:style-name="fr1" draw:name="Image5" text:anchor-type="char" svg:x="-1.09cm" svg:y="0.132cm" svg:width="12.938cm" svg:height="2.884cm" draw:z-index="4"><draw:image xlink:href="Pictures/10000001000001E90000006DB2F1A9A0.png" xlink:type="simple" xlink:show="embed" xlink:actuate="onLoad" draw:mime-type="image/png"/></draw:frame></text:p>
      <text:p text:style-name="P14"/>
      <text:p text:style-name="P19"/>
      <text:p text:style-name="P19"/>
      <text:p text:style-name="P19"/>
      <text:p text:style-name="P19"/>
      <text:p text:style-name="P20">Ce bloc ne s'exécute <text:span text:style-name="T9">que si</text:span> l'utilisateur a tapé quelque chose dans la barre de recherche du formulaire.</text:p>
      <text:list text:style-name="L3">
        <text:list-item>
          <text:p text:style-name="P21"><text:span text:style-name="T3">L'écrasement dynamique</text:span><text:span text:style-name="T1"> : </text:span><text:span text:style-name="Source_20_Text"><text:span text:style-name="T1">mesures_queryset = mesures_queryset.filter(...)</text:span></text:span><text:span text:style-name="T1">. Tu reprends ta requête de base et tu lui ajoutes une couche de filtrage supplémentaire.</text:span></text:p>
        </text:list-item>
        <text:list-item>
          <text:p text:style-name="P21"><text:span text:style-name="T3">Le connecteur </text:span><text:span text:style-name="Source_20_Text"><text:span text:style-name="T3">|</text:span></text:span><text:span text:style-name="T3"> (OU)</text:span><text:span text:style-name="T1"> : Grâce aux objets </text:span><text:span text:style-name="Source_20_Text"><text:span text:style-name="T1">Q()</text:span></text:span><text:span text:style-name="T1">, tu indiques à MySQL de chercher la correspondance soit dans l'identifiant brut du capteur (</text:span><text:span text:style-name="Source_20_Text"><text:span text:style-name="T1">id_capteur__id_capteur</text:span></text:span><text:span text:style-name="T1">), </text:span><text:span text:style-name="T3">OU</text:span><text:span text:style-name="T1"> dans son nom d'usage (</text:span><text:span text:style-name="Source_20_Text"><text:span text:style-name="T1">id_capteur__nom</text:span></text:span><text:span text:style-name="T1">).</text:span></text:p>
        </text:list-item>
        <text:list-item>
          <text:p text:style-name="P21"><text:span text:style-name="Source_20_Text"><text:span text:style-name="T3">__icontains</text:span></text:span><text:span text:style-name="T1"> : C'est l'équivalent du </text:span><text:span text:style-name="Source_20_Text"><text:span text:style-name="T1">LIKE %mot_clé%</text:span></text:span><text:span text:style-name="T1"> en SQL. Le </text:span><text:span text:style-name="T3">"i"</text:span><text:span text:style-name="T1"> de </text:span><text:span text:style-name="Source_20_Text"><text:span text:style-name="T1">icontains</text:span></text:span><text:span text:style-name="T1"> signifie </text:span><text:span text:style-name="T6">insensitive</text:span><text:span text:style-name="T1"> : si l'utilisateur cherche "chambre", cela matchera aussi avec "Chambre" ou "CHAMBRE".</text:span></text:p>
        </text:list-item>
      </text:list>
      <text:p text:style-name="P22"><text:span text:style-name="T10">- </text:span><text:span text:style-name="T11">Le </text:span>rafraichissement <text:span text:style-name="T11">de la page html</text:span> :</text:p>
      <text:p text:style-name="P23" loext:marker-style-name="T12"><text:span text:style-name="T13">setInterval</text:span><text:span text:style-name="T12">(() =&gt; </text:span><text:span text:style-name="T14">window</text:span><text:span text:style-name="T12">.</text:span><text:span text:style-name="T15">location</text:span><text:span text:style-name="T12">.</text:span><text:span text:style-name="T13">reload</text:span><text:span text:style-name="T12">(), </text:span><text:span text:style-name="T16">30000</text:span><text:span text:style-name="T12">);</text:span></text:p>
      <text:p text:style-name="P24"><text:span text:style-name="Source_20_Text"><text:span text:style-name="T17">setInterval( action, delai )</text:span></text:span><text:span text:style-name="T18"> : C'est une minuterie intégrée à JavaScript. Elle sert à répéter une action en boucle indéfiniment, en attendant un certain temps entre chaque exécution.</text:span></text:p>
      <text:p text:style-name="P24"><text:span text:style-name="Source_20_Text"><text:span text:style-name="T3">() =&gt; window.location.reload()</text:span></text:span><text:span text:style-name="T1"> : C'est l'action à exécuter. C'est l'équivalent en code du fait d'appuyer sur la touche </text:span><text:span text:style-name="T3">F5</text:span><text:span text:style-name="T1"> de ton clavier ou de cliquer sur le bouton "Actualiser" de ton navigateur.</text:span></text:p>
      <text:p text:style-name="P24"><text:span text:style-name="Source_20_Text"><text:span text:style-name="T3">30000</text:span></text:span><text:span text:style-name="T1"> : C'est le délai, qui s'écrit obligatoirement en </text:span><text:span text:style-name="T3">millisecondes</text:span><text:span text:style-name="T1">. Ici, 30 000 millisecondes correspondent à </text:span><text:span text:style-name="T3">30 secondes</text:span><text:span text:style-name="T1">.</text:span></text:p>
      <text:p text:style-name="P25"/>
      <text:p text:style-name="P25"/>
      <text:p text:style-name="P26"><text:soft-page-break/><text:span text:style-name="T19">- </text:span><text:span text:style-name="T20">Le </text:span><text:span text:style-name="T19">rafraichissement </text:span><text:span text:style-name="T20">du graphique</text:span><text:span text:style-name="T19"> :</text:span></text:p>
      <text:p text:style-name="P27" loext:marker-style-name="T12"><text:span text:style-name="T21">if not </text:span><text:span text:style-name="T12">date_debut </text:span><text:span text:style-name="T21">and not </text:span><text:span text:style-name="T12">date_fin:<text:line-break/> <text:s text:c="3"/>il_y_a_2_heures = timezone.now() - timedelta(</text:span><text:span text:style-name="T22">hours</text:span><text:span text:style-name="T12">=</text:span><text:span text:style-name="T16">2</text:span><text:span text:style-name="T12">)<text:line-break/> <text:s text:c="3"/>mesures_chrono = mesures_queryset.filter(</text:span><text:span text:style-name="T22">timestamp__gte</text:span><text:span text:style-name="T12">=il_y_a_2_heures).order_by(</text:span><text:span text:style-name="T23">'timestamp'</text:span><text:span text:style-name="T12">)<text:line-break/></text:span><text:span text:style-name="T21">else</text:span><text:span text:style-name="T12">:<text:line-break/> <text:s text:c="3"/>mesures_chrono = mesures_queryset.order_by(</text:span><text:span text:style-name="T23">'timestamp'</text:span><text:span text:style-name="T12">)</text:span></text:p>
      <text:p text:style-name="P28"/>
      <text:p text:style-name="P29"><text:span text:style-name="T24">Si aucun filtre n'est appliqué (Bloc </text:span><text:span text:style-name="Source_20_Text"><text:span text:style-name="T24">if</text:span></text:span><text:span text:style-name="T24">) :</text:span><text:span text:style-name="T25"> Pour éviter de surcharger le graphique avec des milliers de points historiques, l'application génère automatiquement une fenêtre glissante limitée aux </text:span><text:span text:style-name="T24">2 dernières heures</text:span><text:span text:style-name="T25">. On soustrait pour cela un objet </text:span><text:span text:style-name="Source_20_Text"><text:span text:style-name="T25">timedelta(hours=2)</text:span></text:span><text:span text:style-name="T25"> à l'heure actuelle du serveur (</text:span><text:span text:style-name="Source_20_Text"><text:span text:style-name="T25">timezone.now()</text:span></text:span><text:span text:style-name="T25">).</text:span></text:p>
      <text:list text:style-name="L4">
        <text:list-item>
          <text:p text:style-name="P30"><text:span text:style-name="T26">Si un filtre est appliqué (Bloc </text:span><text:span text:style-name="Source_20_Text"><text:span text:style-name="T26">else</text:span></text:span><text:span text:style-name="T26">) :</text:span><text:span text:style-name="T27"> L'application lève cette restriction de 2 heures. Elle transmet au graphique l'intégralité des données demandées par l'utilisateur via le formulaire.</text:span></text:p>
        </text:list-item>
      </text:list>
      <text:list text:style-name="L5">
        <text:list-item>
          <text:p text:style-name="P31"><text:span text:style-name="T26">Le tri chronologique (</text:span><text:span text:style-name="Source_20_Text"><text:span text:style-name="T26">.order_by('timestamp')</text:span></text:span><text:span text:style-name="T26">) :</text:span><text:span text:style-name="T27"> Dans les deux cas, le suffixe </text:span><text:span text:style-name="Source_20_Text"><text:span text:style-name="T27">.order_by('timestamp')</text:span></text:span><text:span text:style-name="T27"> applique un tri croissant (</text:span><text:span text:style-name="Source_20_Text"><text:span text:style-name="T27">ASC</text:span></text:span><text:span text:style-name="T27"> en SQL). C'est une étape indispensable pour que Chart.js affiche la ligne du temps correctement de gauche à droite.</text:span></text:p>
        </text:list-item>
      </text:list>
      <text:p text:style-name="P32"><text:span text:style-name="T19">- </text:span><text:span text:style-name="T28">Export </text:span><text:span text:style-name="T29">CSV</text:span><text:span text:style-name="T19"> :</text:span></text:p>
      <text:p text:style-name="P33"><text:span text:style-name="T30">Conservation dynamique du contexte de filtrage :</text:span><text:span text:style-name="T31"> L'URL du bouton d'exportation réinjecte les filtres actifs de l'utilisateur (</text:span><text:span text:style-name="Source_20_Text"><text:span text:style-name="T31">search</text:span></text:span><text:span text:style-name="T31">, </text:span><text:span text:style-name="Source_20_Text"><text:span text:style-name="T31">date_debut</text:span></text:span><text:span text:style-name="T31">, </text:span><text:span text:style-name="Source_20_Text"><text:span text:style-name="T31">date_fin</text:span></text:span><text:span text:style-name="T31">). Ainsi, si un utilisateur filtre la salle pour voir uniquement les anomalies d'un capteur sur une matinée, le fichier CSV généré contiendra </text:span><text:span text:style-name="T30">exactement</text:span><text:span text:style-name="T31"> cette même sélection, et non pas les milliers de lignes de l'historique global.</text:span></text:p>
      <text:list text:style-name="L6">
        <text:list-item>
          <text:p text:style-name="P34"><text:span text:style-name="T30">Détournement de la réponse HTTP (</text:span><text:span text:style-name="Source_20_Text"><text:span text:style-name="T30">HttpResponse</text:span></text:span><text:span text:style-name="T30">) :</text:span><text:span text:style-name="T31"> Par défaut, Django renvoie du code HTML. Ici, on modifie l'en-tête de la réponse HTTP :</text:span></text:p>
        </text:list-item>
      </text:list>
      <text:p text:style-name="P23" loext:marker-style-name="T12"><text:span text:style-name="T21">def </text:span><text:span text:style-name="T13">export_salle_csv</text:span><text:span text:style-name="T12">(request, salle_nom):<text:line-break/> <text:s text:c="3"/></text:span><text:span text:style-name="T32"># 1. Récupération des filtres pour l'export<text:line-break/> <text:s text:c="3"/></text:span><text:span text:style-name="T12">search_query = request.GET.get(</text:span><text:span text:style-name="T23">'search'</text:span><text:span text:style-name="T12">, </text:span><text:span text:style-name="T23">''</text:span><text:span text:style-name="T12">).strip()<text:line-break/> <text:s text:c="3"/>date_debut = request.GET.get(</text:span><text:span text:style-name="T23">'date_debut'</text:span><text:span text:style-name="T12">, </text:span><text:span text:style-name="T23">''</text:span><text:span text:style-name="T12">)<text:line-break/> <text:s text:c="3"/>date_fin = request.GET.get(</text:span><text:span text:style-name="T23">'date_fin'</text:span><text:span text:style-name="T12">, </text:span><text:span text:style-name="T23">''</text:span><text:span text:style-name="T12">)<text:line-break/><text:line-break/> <text:s text:c="3"/>mesures_queryset = Donnees.objects.filter(</text:span><text:span text:style-name="T22">id_capteur__emplacement</text:span><text:span text:style-name="T12">=salle_nom).select_related(</text:span><text:span text:style-name="T23">'id_capteur'</text:span><text:span text:style-name="T12">).order_by(<text:line-break/> <text:s text:c="7"/></text:span><text:span text:style-name="T23">'-timestamp'</text:span><text:span text:style-name="T12">)<text:line-break/><text:line-break/> <text:s text:c="3"/></text:span><text:span text:style-name="T21">if </text:span><text:span text:style-name="T12">search_query:<text:line-break/> <text:s text:c="7"/>mesures_queryset = mesures_queryset.filter(<text:line-break/> <text:s text:c="11"/>Q(</text:span><text:span text:style-name="T22">id_capteur__id_capteur__icontains</text:span><text:span text:style-name="T12">=search_query) |<text:line-break/> <text:s text:c="11"/>Q(</text:span><text:span text:style-name="T22">id_capteur__nom__icontains</text:span><text:span text:style-name="T12">=search_query)<text:line-break/> <text:s text:c="7"/>)<text:line-break/> <text:s text:c="3"/></text:span><text:span text:style-name="T21">if </text:span><text:span text:style-name="T12">date_debut:<text:line-break/> <text:s text:c="7"/>mesures_queryset = mesures_queryset.filter(</text:span><text:span text:style-name="T22">timestamp__gte</text:span><text:span text:style-name="T12">=date_debut)<text:line-break/> <text:s text:c="3"/></text:span><text:span text:style-name="T21">if </text:span><text:span text:style-name="T12">date_fin:<text:line-break/> <text:s text:c="7"/>mesures_queryset = mesures_queryset.filter(</text:span><text:span text:style-name="T22">timestamp__lte</text:span><text:span text:style-name="T12">=date_fin)<text:line-break/><text:line-break/> <text:s text:c="3"/></text:span><text:span text:style-name="T32"># 2. Préparation du fichier CSV<text:line-break/> <text:s text:c="3"/></text:span><text:span text:style-name="T12">response = HttpResponse(</text:span><text:span text:style-name="T22">content_type</text:span><text:span text:style-name="T12">=</text:span><text:span text:style-name="T23">'text/csv'</text:span><text:span text:style-name="T12">)<text:line-break/> <text:s text:c="3"/>response[</text:span><text:span text:style-name="T23">'Content-Disposition'</text:span><text:span text:style-name="T12">] = </text:span><text:span text:style-name="T23">f'attachment; filename="export_</text:span><text:span text:style-name="T21">{</text:span><text:span text:style-name="T12">salle_nom</text:span><text:span text:style-name="T21">}</text:span><text:span text:style-name="T23">.csv"'<text:line-break/><text:line-break/> <text:s text:c="3"/></text:span><text:span text:style-name="T12">writer = csv.writer(response, </text:span><text:span text:style-name="T22">delimiter</text:span><text:span text:style-name="T12">=</text:span><text:span text:style-name="T23">';'</text:span><text:span text:style-name="T12">)<text:line-break/> <text:s text:c="3"/>writer.writerow([</text:span><text:span text:style-name="T23">'ID Capteur'</text:span><text:span text:style-name="T12">, </text:span><text:span text:style-name="T23">'Nom du Capteur'</text:span><text:span text:style-name="T12">, </text:span><text:span text:style-name="T23">'Valeur Enregistree (C)'</text:span><text:span text:style-name="T12">, </text:span><text:span text:style-name="T23">'Date et Heure'</text:span><text:span text:style-name="T12">])</text:span></text:p>
      <text:p text:style-name="P35"><text:s text:c="266"/></text:p>
      <text:p text:style-name="P36"><text:soft-page-break/><text:span text:style-name="T1">Le </text:span><text:span text:style-name="Source_20_Text"><text:span text:style-name="T1">content_type='text/csv'</text:span></text:span><text:span text:style-name="T1"> indique au navigateur web qu'il ne s'agit pas d'une page à afficher, mais d'un fichier tableur. Le </text:span><text:span text:style-name="Source_20_Text"><text:span text:style-name="T1">Content-Disposition</text:span></text:span><text:span text:style-name="T1"> force le navigateur à déclencher le téléchargement automatique du fichier.</text:span></text:p>
      <text:list text:style-name="L7">
        <text:list-item>
          <text:p text:style-name="P37"><text:span text:style-name="T9">Formatage d'échange (</text:span><text:span text:style-name="Source_20_Text"><text:span text:style-name="T9">csv.writer</text:span></text:span><text:span text:style-name="T9">) :</text:span> Le module natif <text:span text:style-name="Source_20_Text">csv</text:span> de Python écrit les données ligne par ligne. Le choix du séparateur point-virgule (<text:span text:style-name="Source_20_Text">delimiter=';'</text:span>) assure une compatibilité native et immédiate lors de l'ouverture du fichier sous Microsoft Excel en version française.</text:p>
        </text:list-item>
      </text:list>
      <text:p text:style-name="P38"><text:span text:style-name="T19">- </text:span><text:span text:style-name="T29">Fonction CRUD ( delete/modifier)</text:span><text:span text:style-name="T19"> :</text:span></text:p>
      <text:p text:style-name="P23" loext:marker-style-name="T12"><text:span text:style-name="T21">def </text:span><text:span text:style-name="T13">supprimer_donnee</text:span><text:span text:style-name="T12">(</text:span><text:span text:style-name="T33">request</text:span><text:span text:style-name="T12">, donnee_id):<text:line-break/> <text:s text:c="3"/>donnee = get_object_or_404(Donnees, </text:span><text:span text:style-name="T22">id_donnee</text:span><text:span text:style-name="T12">=donnee_id)<text:line-break/> <text:s text:c="3"/>salle_nom = donnee.id_capteur.emplacement<text:line-break/> <text:s text:c="3"/>donnee.delete()<text:line-break/> <text:s text:c="3"/></text:span><text:span text:style-name="T21">return </text:span><text:span text:style-name="T12">redirect(</text:span><text:span text:style-name="T23">'salle_detail'</text:span><text:span text:style-name="T12">, </text:span><text:span text:style-name="T22">salle_nom</text:span><text:span text:style-name="T12">=salle_nom)</text:span></text:p>
      <text:p text:style-name="P39"/>
      <text:p text:style-name="P40"><text:span text:style-name="T9">Sécurité de l'accès (</text:span><text:span text:style-name="Source_20_Text"><text:span text:style-name="T9">get_object_or_404</text:span></text:span><text:span text:style-name="T9">) :</text:span> Avant de supprimer, l'application valide que l'identifiant unique de la mesure (<text:span text:style-name="Source_20_Text">id_donnee</text:span>) existe bien en base MySQL. Si un utilisateur tente de forcer une URL avec un ID invalide, Django intercepte la requête et renvoie proprement une erreur 404 au lieu de faire cracher le serveur.</text:p>
      <text:list text:style-name="L8">
        <text:list-item>
          <text:p text:style-name="P41"><text:span text:style-name="T9">Expérience utilisateur (UX) :</text:span> Une fois la méthode <text:span text:style-name="Source_20_Text">.delete()</text:span> exécutée en SQL, la vue extrait dynamiquement le nom de la pièce où se trouvait la donnée pour rediriger instantanément l'utilisateur (<text:span text:style-name="Source_20_Text">redirect</text:span>) sur le tableau de bord de cette même pièce, rendant l'action invisible et fluide.</text:p>
        </text:list-item>
      </text:list>
      <text:p text:style-name="P23" loext:marker-style-name="T12"><text:span text:style-name="T21">def </text:span><text:span text:style-name="T13">modifier_capteur</text:span><text:span text:style-name="T12">(request, capteur_id):<text:line-break/> <text:s text:c="3"/>capteur = get_object_or_404(Capteurs, </text:span><text:span text:style-name="T22">id_capteur</text:span><text:span text:style-name="T12">=capteur_id)<text:line-break/><text:line-break/> <text:s text:c="3"/></text:span><text:span text:style-name="T21">if </text:span><text:span text:style-name="T12">request.method == </text:span><text:span text:style-name="T23">'POST'</text:span><text:span text:style-name="T12">:<text:line-break/> <text:s text:c="7"/>capteur.nom = request.POST.get(</text:span><text:span text:style-name="T23">'nom_capteur'</text:span><text:span text:style-name="T12">)<text:line-break/> <text:s text:c="7"/>capteur.emplacement = request.POST.get(</text:span><text:span text:style-name="T23">'emplacement_capteur'</text:span><text:span text:style-name="T12">)<text:line-break/> <text:s text:c="7"/>capteur.save()<text:line-break/> <text:s text:c="7"/></text:span><text:span text:style-name="T21">return </text:span><text:span text:style-name="T12">redirect(</text:span><text:span text:style-name="T23">'salle_detail'</text:span><text:span text:style-name="T12">, </text:span><text:span text:style-name="T22">salle_nom</text:span><text:span text:style-name="T12">=capteur.emplacement)<text:line-break/><text:line-break/> <text:s text:c="3"/></text:span><text:span text:style-name="T21">return </text:span><text:span text:style-name="T12">render(request, </text:span><text:span text:style-name="T23">'capteurs/modifier_capteur.html'</text:span><text:span text:style-name="T12">, {</text:span><text:span text:style-name="T23">'capteur'</text:span><text:span text:style-name="T12">: capteur})</text:span></text:p>
      <text:p text:style-name="P42"/>
      <text:p text:style-name="P40"><text:span text:style-name="T9">Le protocole GET (Affichage) :</text:span> Lorsque l'utilisateur clique sur le bouton d'édition (l'icône crayon), la vue récupère les informations actuelles du capteur et pré-remplit les champs du formulaire dans le template dédié.</text:p>
      <text:list text:style-name="L9">
        <text:list-item>
          <text:p text:style-name="P43"><text:span text:style-name="T9">Le protocole POST (Enregistrement) :</text:span> Lorsque l'utilisateur valide le formulaire, la vue intercepte la méthode <text:span text:style-name="Source_20_Text">POST</text:span>, extrait les nouvelles valeurs (<text:span text:style-name="Source_20_Text">nom_capteur</text:span>, <text:span text:style-name="Source_20_Text">emplacement_capteur</text:span>), écrase les anciennes propriétés de l'objet, puis appelle la méthode <text:span text:style-name="Source_20_Text">.save()</text:span>. Django traduit cela immédiatement en une requête SQL <text:span text:style-name="Source_20_Text">UPDATE</text:span> dans la table MySQL.</text:p>
        </text:list-item>
      </text:list>
      <text:p text:style-name="P44"><text:span text:style-name="T34">- </text:span><text:span text:style-name="T35">Models.py </text:span><text:span text:style-name="T34">:</text:span></text:p>
      <text:p text:style-name="P23" loext:marker-style-name="T23"><text:span text:style-name="T21">class </text:span><text:span text:style-name="T12">Capteurs(models.Model):<text:line-break/> <text:s text:c="3"/>id_capteur = models.CharField(</text:span><text:span text:style-name="T22">primary_key</text:span><text:span text:style-name="T12">=</text:span><text:span text:style-name="T21">True</text:span><text:span text:style-name="T12">, </text:span><text:span text:style-name="T22">max_length</text:span><text:span text:style-name="T12">=</text:span><text:span text:style-name="T16">50</text:span><text:span text:style-name="T12">)<text:line-break/> <text:s text:c="3"/>nom = models.CharField(</text:span><text:span text:style-name="T22">unique</text:span><text:span text:style-name="T12">=</text:span><text:span text:style-name="T21">True</text:span><text:span text:style-name="T12">, </text:span><text:span text:style-name="T22">max_length</text:span><text:span text:style-name="T12">=</text:span><text:span text:style-name="T16">100</text:span><text:span text:style-name="T12">, </text:span><text:span text:style-name="T22">blank</text:span><text:span text:style-name="T12">=</text:span><text:span text:style-name="T21">True</text:span><text:span text:style-name="T12">, </text:span><text:span text:style-name="T22">null</text:span><text:span text:style-name="T12">=</text:span><text:span text:style-name="T21">True</text:span><text:span text:style-name="T12">)<text:line-break/> <text:s text:c="3"/>emplacement = models.CharField(</text:span><text:span text:style-name="T22">max_length</text:span><text:span text:style-name="T12">=</text:span><text:span text:style-name="T16">100</text:span><text:span text:style-name="T12">, </text:span><text:span text:style-name="T22">blank</text:span><text:span text:style-name="T12">=</text:span><text:span text:style-name="T21">True</text:span><text:span text:style-name="T12">, </text:span><text:span text:style-name="T22">null</text:span><text:span text:style-name="T12">=</text:span><text:span text:style-name="T21">True</text:span><text:span text:style-name="T12">)<text:line-break/><text:line-break/> <text:s text:c="3"/></text:span><text:span text:style-name="T21">class </text:span><text:span text:style-name="T12">Meta:<text:line-break/> <text:s text:c="7"/>managed = </text:span><text:span text:style-name="T21">False<text:line-break/> <text:s text:c="7"/></text:span><text:span text:style-name="T12">db_table = </text:span><text:span text:style-name="T23">'capteurs'</text:span></text:p>
      <text:p text:style-name="P45"><text:soft-page-break/></text:p>
      <text:p text:style-name="P46"><text:span text:style-name="Source_20_Text"><text:span text:style-name="T3">id_capteur (CharField, primary_key=True)</text:span></text:span><text:span text:style-name="T3"> :</text:span><text:span text:style-name="T1"> Contrairement à un ID numérique classique, la clé primaire est ici textuelle. Cela permet de calquer l'identifiant Django sur l'identifiant physique ou l'adresse MAC réelle du capteur IoT pour faciliter le mapping.</text:span></text:p>
      <text:p text:style-name="P46"><text:span text:style-name="Source_20_Text"><text:span text:style-name="T3">emplacement</text:span></text:span><text:span text:style-name="T3"> :</text:span><text:span text:style-name="T1"> Ce champ stocke le nom de la pièce (ex: "chambre1"). C'est sur cette colonne que se basent toutes les fonctions de filtrage de nos vues.</text:span></text:p>
      <text:p text:style-name="P47"/>
      <text:p text:style-name="P23" loext:marker-style-name="T23"><text:span text:style-name="T21">class </text:span><text:span text:style-name="T12">Donnees(models.Model):<text:line-break/> <text:s text:c="3"/>id_donnee = models.AutoField(</text:span><text:span text:style-name="T22">primary_key</text:span><text:span text:style-name="T12">=</text:span><text:span text:style-name="T21">True</text:span><text:span text:style-name="T12">)<text:line-break/> <text:s text:c="3"/>timestamp = models.DateTimeField()<text:line-break/> <text:s text:c="3"/>temperature = models.FloatField()<text:line-break/> <text:s text:c="3"/>id_capteur = models.ForeignKey(Capteurs, </text:span><text:span text:style-name="T36">models.DO_NOTHING</text:span><text:span text:style-name="T12">, </text:span><text:span text:style-name="T22">db_column</text:span><text:span text:style-name="T12">=</text:span><text:span text:style-name="T23">'id_capteur'</text:span><text:span text:style-name="T12">, </text:span><text:span text:style-name="T22">blank</text:span><text:span text:style-name="T12">=</text:span><text:span text:style-name="T21">True</text:span><text:span text:style-name="T12">, </text:span><text:span text:style-name="T22">null</text:span><text:span text:style-name="T12">=</text:span><text:span text:style-name="T21">True</text:span><text:span text:style-name="T12">)<text:line-break/><text:line-break/> <text:s text:c="3"/></text:span><text:span text:style-name="T21">class </text:span><text:span text:style-name="T12">Meta:<text:line-break/> <text:s text:c="7"/>managed = </text:span><text:span text:style-name="T21">False<text:line-break/> <text:s text:c="7"/></text:span><text:span text:style-name="T12">db_table = </text:span><text:span text:style-name="T23">'donnees'</text:span></text:p>
      <text:p text:style-name="P48"/>
      <text:p text:style-name="P49"><text:span text:style-name="Source_20_Text"><text:span text:style-name="T9">timestamp (DateTimeField)</text:span></text:span><text:span text:style-name="T9"> :</text:span> Enregistre la date et l'heure précises de la réception de la trame, élément indispensable pour le tracé chronologique de notre graphique Chart.js.</text:p>
      <text:p text:style-name="P49"><text:span text:style-name="Source_20_Text"><text:span text:style-name="T9">temperature (FloatField)</text:span></text:span><text:span text:style-name="T9"> :</text:span> Stocke la mesure physique brute sous forme de nombre à virgule.</text:p>
      <text:p text:style-name="P50"/>
      <text:p text:style-name="P50"/>
      <text:p text:style-name="P51" loext:marker-style-name="T23"><text:span text:style-name="T36">models.DO_NOTHING</text:span></text:p>
      <text:p text:style-name="P49"><text:span text:style-name="T37">Dans un système IoT, si un administrateur supprime temporairement la fiche technique d'un capteur dans la table </text:span><text:span text:style-name="Source_20_Text"><text:span text:style-name="T37">Capteurs</text:span></text:span><text:span text:style-name="T37">, on ne veut surtout pas que MySQL applique un effet "cascade" (</text:span><text:span text:style-name="Source_20_Text"><text:span text:style-name="T37">CASCADE</text:span></text:span><text:span text:style-name="T37">) qui détruirait instantanément des millions de lignes d'historique météo ou thermique associées dans la table </text:span><text:span text:style-name="Source_20_Text"><text:span text:style-name="T37">Donnees</text:span></text:span><text:span text:style-name="T37">. Ce choix garantit la conservation des archives de mesures de l'IUT quoi qu'il arrive </text:span><text:span text:style-name="T38">cela explique le DO_NOTHING</text:span><text:span text:style-name="T37">. </text:span></text:p>
      <text:p text:style-name="P48"/>
      <text:p text:style-name="P48"/>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6T10:54:04.046659900</meta:creation-date>
    <meta:print-date>2026-06-16T15:55:23.916162900</meta:print-date>
    <meta:printed-by>Fichiers PDF</meta:printed-by>
    <dc:date>2026-06-18T14:59:29.425061800</dc:date>
    <meta:editing-duration>PT15M44S</meta:editing-duration>
    <meta:editing-cycles>3</meta:editing-cycles>
    <meta:generator>LibreOffice/25.2.7.2$Windows_X86_64 LibreOffice_project/5cbfd1ab6520636bb5f7b99185aa69bd7456825d</meta:generator>
    <meta:document-statistic meta:table-count="0" meta:image-count="5" meta:object-count="0" meta:page-count="5" meta:paragraph-count="52" meta:word-count="1386" meta:character-count="10775" meta:non-whitespace-character-count="8917"/>
  </office:meta>
</office:document-meta>
</file>