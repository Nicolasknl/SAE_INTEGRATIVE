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60000006461C73B10.png" manifest:media-type="image/png"/>
  <manifest:file-entry manifest:full-path="Pictures/10000001000002DC000000113921DBE4.png" manifest:media-type="image/png"/>
  <manifest:file-entry manifest:full-path="Pictures/1000000100000269000000A1A3BE2997.png" manifest:media-type="image/png"/>
  <manifest:file-entry manifest:full-path="Pictures/10000001000003A70000002B6362D97B.png" manifest:media-type="image/png"/>
  <manifest:file-entry manifest:full-path="Pictures/10000001000001E90000006DB2F1A9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00d44" officeooo:paragraph-rsid="00100d44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00d44" officeooo:paragraph-rsid="00100d4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00d44" officeooo:paragraph-rsid="00100d4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0d44" officeooo:paragraph-rsid="00100d4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21705" officeooo:paragraph-rsid="00121705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00d44" officeooo:paragraph-rsid="00100d44" style:font-size-asian="12.25pt" style:font-weight-asian="normal" style:font-size-complex="14pt" style:font-weight-complex="normal"/>
    </style:style>
    <style:style style:name="P7" style:family="paragraph" style:parent-style-name="Text_20_body" style:list-style-name="L1">
      <style:text-properties fo:font-size="14pt" officeooo:rsid="00100d44" style:font-size-asian="12.25pt" style:font-size-complex="14pt"/>
    </style:style>
    <style:style style:name="P8" style:family="paragraph" style:parent-style-name="Text_20_body" style:list-style-name="L1">
      <style:text-properties fo:font-size="11pt" officeooo:rsid="00100d44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21705" officeooo:paragraph-rsid="0012170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1705" officeooo:paragraph-rsid="0012170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1705" officeooo:paragraph-rsid="00121705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21705" officeooo:paragraph-rsid="00121705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2d6eb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1705" officeooo:paragraph-rsid="0012d6e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45f8c" officeooo:paragraph-rsid="00145f8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5f8c" officeooo:paragraph-rsid="00145f8c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1pt" style:text-underline-style="none" fo:font-weight="normal" officeooo:rsid="00121705" officeooo:paragraph-rsid="0012d6eb" style:font-size-asian="11pt" style:font-weight-asian="normal" style:font-size-complex="11pt" style:font-weight-complex="normal"/>
    </style:style>
    <style:style style:name="P18" style:family="paragraph" style:parent-style-name="Text_20_body" style:list-style-name="L2">
      <style:text-properties fo:font-size="14pt" officeooo:rsid="00121705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5f8c" officeooo:paragraph-rsid="0012d6eb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1pt" style:text-underline-style="none" fo:font-weight="normal" officeooo:rsid="00145f8c" officeooo:paragraph-rsid="0012d6eb" style:font-size-asian="11pt" style:font-weight-asian="normal" style:font-size-complex="11pt" style:font-weight-complex="normal"/>
    </style:style>
    <style:style style:name="P21" style:family="paragraph" style:parent-style-name="Text_20_body" style:list-style-name="L3">
      <style:text-properties fo:font-size="14pt" officeooo:rsid="00145f8c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10b9d" style:font-size-asian="11pt" style:font-size-complex="11pt"/>
    </style:style>
    <style:style style:name="T3" style:family="text">
      <style:text-properties fo:font-size="11pt" fo:font-weight="bold" style:font-size-asian="11pt" style:font-size-complex="11pt"/>
    </style:style>
    <style:style style:name="T4" style:family="text">
      <style:text-properties fo:font-size="11pt" officeooo:rsid="00110b9d" fo:background-color="#ffff00" loext:char-shading-value="0" style:font-size-asian="11pt" style:font-size-complex="11pt"/>
    </style:style>
    <style:style style:name="T5" style:family="text">
      <style:text-properties fo:font-size="11pt" officeooo:rsid="00121705" style:font-size-asian="11pt" style:font-size-complex="11pt"/>
    </style:style>
    <style:style style:name="T6" style:family="text">
      <style:text-properties fo:font-size="11pt" fo:font-style="italic" style:font-size-asian="11pt" style:font-size-complex="11pt"/>
    </style:style>
    <style:style style:name="T7" style:family="text">
      <style:text-properties fo:font-size="11pt" style:text-underline-style="none" fo:font-weight="normal" officeooo:rsid="00121705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officeooo:rsid="0012d6eb" style:font-size-asian="11pt" style:font-weight-asian="normal" style:font-size-complex="11pt" style:font-weight-complex="normal"/>
    </style:style>
    <style:style style:name="T9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Intégrative</text:p>
      <text:p text:style-name="P2"/>
      <text:p text:style-name="P2"/>
      <text:p text:style-name="P3">VIEWS.PY :</text:p>
      <text:p text:style-name="P4"/>
      <text:p text:style-name="P5">- Calcule des moyennes :</text:p>
      <text:p text:style-name="P4"/>
      <text:p text:style-name="P4"><draw:frame draw:style-name="fr1" draw:name="Image1" text:anchor-type="char" svg:width="13.423cm" svg:height="2.027cm" draw:z-index="0"><draw:image xlink:href="Pictures/10000001000002960000006461C73B10.png" xlink:type="simple" xlink:show="embed" xlink:actuate="onLoad" draw:mime-type="image/png"/></draw:frame><text:span text:style-name="T1">En Django, mettre </text:span><text:span text:style-name="Source_20_Text"><text:span text:style-name="T1">.values()</text:span></text:span><text:span text:style-name="T1"> juste après un </text:span><text:span text:style-name="Source_20_Text"><text:span text:style-name="T1">.objects</text:span></text:span><text:span text:style-name="T1"> change le comportement de la requête. Au lieu de récupérer des objets complets, </text:span><text:span text:style-name="T2">on</text:span><text:span text:style-name="T1"> demandes à Django de </text:span><text:span text:style-name="T3">regrouper</text:span><text:span text:style-name="T1"> les lignes qui ont exactement la même valeur dans le champ spécifié </text:span><text:span text:style-name="T2">( en l’occurrence </text:span><text:span text:style-name="T4">« id_capteur__emplacement »</text:span><text:span text:style-name="T2"> </text:span><text:span text:style-name="T1">. </text:span><text:span text:style-name="T2">Cela permet d’optimiser notre application pour éviter des gros calcules qui fera ralentir </text:span><text:span text:style-name="T5">( moins d’utilisation de RAM)</text:span><text:span text:style-name="T2"> notre applications a partir d’un certain nombres de valeurs.</text:span></text:p>
      <text:p text:style-name="P6"><text:span text:style-name="T1">Une fois les groupes formés par pièce, </text:span><text:span text:style-name="Source_20_Text"><text:span text:style-name="T1">.annotate()</text:span></text:span><text:span text:style-name="T1"> (qui signifie "ajouter une note" ou "calculer une colonne supplémentaire") va appliquer une fonction mathématique sur </text:span><text:span text:style-name="T3">chaque groupe</text:span><text:span text:style-name="T1">.</text:span></text:p>
      <text:list text:style-name="L1">
        <text:list-item>
          <text:p text:style-name="P7"><text:span text:style-name="T1">Ici, on utilise </text:span><text:span text:style-name="Source_20_Text"><text:span text:style-name="T1">Avg('temperature')</text:span></text:span><text:span text:style-name="T1"> (</text:span><text:span text:style-name="Source_20_Text"><text:span text:style-name="T1">Avg</text:span></text:span><text:span text:style-name="T1"> pour </text:span><text:span text:style-name="T6">Average</text:span><text:span text:style-name="T1"> / Moyenne).</text:span></text:p>
        </text:list-item>
        <text:list-item>
          <text:p text:style-name="P8">MySQL va prendre toutes les températures de la 'chambre1', calculer leur moyenne, et associer ce résultat unique au groupe 'chambre1'. Il fait de même pour le 'sejour'.</text:p>
        </text:list-item>
      </text:list>
      <text:p text:style-name="P9">Voici a quoi ressemble la requête côté SQL : </text:p>
      <text:p text:style-name="P10"/>
      <text:p text:style-name="P11"><draw:frame draw:style-name="fr1" draw:name="Image2" text:anchor-type="char" svg:width="13.76cm" svg:height="3.59cm" draw:z-index="1"><draw:image xlink:href="Pictures/1000000100000269000000A1A3BE2997.png" xlink:type="simple" xlink:show="embed" xlink:actuate="onLoad" draw:mime-type="image/png"/></draw:frame></text:p>
      <text:p text:style-name="P11"/>
      <text:p text:style-name="P12">- Affichage des 5 dernières données sur me dashboard :</text:p>
      <text:p text:style-name="P12"/>
      <text:p text:style-name="P13"><draw:frame draw:style-name="fr2" draw:name="Image3" text:anchor-type="char" svg:width="17cm" svg:height="0.702cm" draw:z-index="2"><draw:image xlink:href="Pictures/10000001000002DC000000113921DBE4.png" xlink:type="simple" xlink:show="embed" xlink:actuate="onLoad" draw:mime-type="image/png"/></draw:frame><text:span text:style-name="T7">Par défaut, l'accès à des clés étrangères dans une boucle génère le problème de performance dit des 'requêtes en N+1', où le serveur sature la base de données d'allers-retours. Pour optimiser l'application, j'ai utilisé la méthode </text:span><text:span text:style-name="Source_20_Text"><text:span text:style-name="T7">select_related</text:span></text:span><text:span text:style-name="T7"> de Django. Cela force à réaliser une </text:span><text:span text:style-name="T8">requêtes </text:span><text:span text:style-name="T7">SQL (JOIN) côté base de données. On passe ainsi de 6 requêtes SQL à une seule requête unique pour afficher le tableau des derniers relevés, ce qui garantit la </text:span><text:span text:style-name="T8">fiabilité</text:span><text:span text:style-name="T7"> de l'application si le volume de données augmente</text:span><text:span text:style-name="T8"> (</text:span><text:span text:style-name="T1">Django charge tout ça en mémoire en </text:span><text:span text:style-name="T3">une seule et unique requête SQL</text:span><text:span text:style-name="T1">. Peu importe si tu affiches 5, 100 ou 1000 lignes, le nombre de requêtes restera égal à </text:span><text:span text:style-name="T3">1</text:span><text:span text:style-name="T8">)</text:span><text:span text:style-name="T7">. <text:s text:c="4"/></text:span></text:p>
      <text:p text:style-name="P14"/>
      <text:p text:style-name="P15">- Filtrage :</text:p>
      <text:p text:style-name="P15"/>
      <text:p text:style-name="P15"><text:soft-page-break/></text:p>
      <text:p text:style-name="P16"><draw:frame draw:style-name="fr1" draw:name="Image4" text:anchor-type="char" svg:width="19.001cm" svg:height="1.041cm" draw:z-index="3"><draw:image xlink:href="Pictures/10000001000003A70000002B6362D97B.png" xlink:type="simple" xlink:show="embed" xlink:actuate="onLoad" draw:mime-type="image/png"/></draw:frame></text:p>
      <text:p text:style-name="P17">Django effectue trois actions en une seule ligne :</text:p>
      <text:list text:style-name="L2">
        <text:list-item>
          <text:p text:style-name="P18"><text:span text:style-name="Source_20_Text"><text:span text:style-name="T3">filter(id_capteur__emplacement=salle_nom)</text:span></text:span><text:span text:style-name="T1"> : Remarque la </text:span><text:span text:style-name="T3">double liasse de soulignement (</text:span><text:span text:style-name="Source_20_Text"><text:span text:style-name="T3">__</text:span></text:span><text:span text:style-name="T3">)</text:span><text:span text:style-name="T1">. C'est la syntaxe de Django pour traverser les tables. Tu pars de la table </text:span><text:span text:style-name="Source_20_Text"><text:span text:style-name="T1">Donnees</text:span></text:span><text:span text:style-name="T1">, tu suis la clé étrangère </text:span><text:span text:style-name="Source_20_Text"><text:span text:style-name="T1">id_capteur</text:span></text:span><text:span text:style-name="T1"> pour sauter dans la table </text:span><text:span text:style-name="Source_20_Text"><text:span text:style-name="T1">Capteurs</text:span></text:span><text:span text:style-name="T1">, et tu filtres sur la colonne </text:span><text:span text:style-name="Source_20_Text"><text:span text:style-name="T1">emplacement</text:span></text:span><text:span text:style-name="T1">.</text:span></text:p>
        </text:list-item>
        <text:list-item>
          <text:p text:style-name="P18"><text:span text:style-name="Source_20_Text"><text:span text:style-name="T3">.select_related('id_capteur')</text:span></text:span><text:span text:style-name="T1"> : C'est l'optimisation (Jointure SQL) qu'on a vue juste avant. On embarque tout de suite les infos du capteur pour s'éviter le piège du N+1 requêtes lors de l'affichage dans le tableau HTML.</text:span></text:p>
        </text:list-item>
        <text:list-item>
          <text:p text:style-name="P18"><text:span text:style-name="Source_20_Text"><text:span text:style-name="T3">.order_by('-timestamp')</text:span></text:span><text:span text:style-name="T1"> : Le signe </text:span><text:span text:style-name="T3">moins (</text:span><text:span text:style-name="Source_20_Text"><text:span text:style-name="T3">-</text:span></text:span><text:span text:style-name="T3">)</text:span><text:span text:style-name="T1"> indique un tri </text:span><text:span text:style-name="T3">décroissant</text:span><text:span text:style-name="T1">. Les mesures les plus récentes apparaîtront en premier dans ton tableau HTML.</text:span></text:p>
        </text:list-item>
      </text:list>
      <text:p text:style-name="P14"><draw:frame draw:style-name="fr3" draw:name="Image5" text:anchor-type="char" svg:x="-1.09cm" svg:y="0.132cm" svg:width="12.938cm" svg:height="2.884cm" draw:z-index="4"><draw:image xlink:href="Pictures/10000001000001E90000006DB2F1A9A0.png" xlink:type="simple" xlink:show="embed" xlink:actuate="onLoad" draw:mime-type="image/png"/></draw:frame></text:p>
      <text:p text:style-name="P14"/>
      <text:p text:style-name="P19"/>
      <text:p text:style-name="P19"/>
      <text:p text:style-name="P19"/>
      <text:p text:style-name="P19"/>
      <text:p text:style-name="P20">Ce bloc ne s'exécute <text:span text:style-name="T9">que si</text:span> l'utilisateur a tapé quelque chose dans la barre de recherche du formulaire.</text:p>
      <text:list text:style-name="L3">
        <text:list-item>
          <text:p text:style-name="P21"><text:span text:style-name="T3">L'écrasement dynamique</text:span><text:span text:style-name="T1"> : </text:span><text:span text:style-name="Source_20_Text"><text:span text:style-name="T1">mesures_queryset = mesures_queryset.filter(...)</text:span></text:span><text:span text:style-name="T1">. Tu reprends ta requête de base et tu lui ajoutes une couche de filtrage supplémentaire.</text:span></text:p>
        </text:list-item>
        <text:list-item>
          <text:p text:style-name="P21"><text:span text:style-name="T3">Le connecteur </text:span><text:span text:style-name="Source_20_Text"><text:span text:style-name="T3">|</text:span></text:span><text:span text:style-name="T3"> (OU)</text:span><text:span text:style-name="T1"> : Grâce aux objets </text:span><text:span text:style-name="Source_20_Text"><text:span text:style-name="T1">Q()</text:span></text:span><text:span text:style-name="T1">, tu indiques à MySQL de chercher la correspondance soit dans l'identifiant brut du capteur (</text:span><text:span text:style-name="Source_20_Text"><text:span text:style-name="T1">id_capteur__id_capteur</text:span></text:span><text:span text:style-name="T1">), </text:span><text:span text:style-name="T3">OU</text:span><text:span text:style-name="T1"> dans son nom d'usage (</text:span><text:span text:style-name="Source_20_Text"><text:span text:style-name="T1">id_capteur__nom</text:span></text:span><text:span text:style-name="T1">).</text:span></text:p>
        </text:list-item>
        <text:list-item>
          <text:p text:style-name="P21"><text:span text:style-name="Source_20_Text"><text:span text:style-name="T3">__icontains</text:span></text:span><text:span text:style-name="T1"> : C'est l'équivalent du </text:span><text:span text:style-name="Source_20_Text"><text:span text:style-name="T1">LIKE %mot_clé%</text:span></text:span><text:span text:style-name="T1"> en SQL. Le </text:span><text:span text:style-name="T3">"i"</text:span><text:span text:style-name="T1"> de </text:span><text:span text:style-name="Source_20_Text"><text:span text:style-name="T1">icontains</text:span></text:span><text:span text:style-name="T1"> signifie </text:span><text:span text:style-name="T6">insensitive</text:span><text:span text:style-name="T1"> : si l'utilisateur cherche "chambre", cela matchera aussi avec "Chambre" ou "CHAMBRE".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10:54:04.046659900</meta:creation-date>
    <meta:print-date>2026-06-16T15:55:23.916162900</meta:print-date>
    <meta:printed-by>Fichiers PDF</meta:printed-by>
    <dc:date>2026-06-16T15:56:09.865983200</dc:date>
    <meta:editing-duration>PT45S</meta:editing-duration>
    <meta:editing-cycles>1</meta:editing-cycles>
    <meta:generator>LibreOffice/25.2.7.2$Windows_X86_64 LibreOffice_project/5cbfd1ab6520636bb5f7b99185aa69bd7456825d</meta:generator>
    <meta:document-statistic meta:table-count="0" meta:image-count="5" meta:object-count="0" meta:page-count="2" meta:paragraph-count="19" meta:word-count="492" meta:character-count="3082" meta:non-whitespace-character-count="2611"/>
  </office:meta>
</office:document-meta>
</file>